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 and Configure Google App Engine on Ubuntu (Without Sign-In / Payment Details)</text:h>
      <text:p text:style-name="Text_20_body">Based on your screenshots, Google Cloud SDK is already installed successfully.<text:line-break/>Now follow these exact Ubuntu terminal steps.</text:p>
      <text:p text:style-name="Horizontal_20_Line"/>
      <text:h text:style-name="Heading_20_1" text:outline-level="1">Step 1: Open Terminal</text:h>
      <text:p text:style-name="Text_20_body">Press:</text:p>
      <text:section text:style-name="Sect1" text:name="code-block-viewer">
        <text:p text:style-name="P1"><text:span text:style-name="Source_20_Text">Ctrl + Alt + T</text:span></text:p>
      </text:section>
      <text:p text:style-name="Horizontal_20_Line"/>
      <text:h text:style-name="Heading_20_1" text:outline-level="1">Step 2: Download Google Cloud SDK</text:h>
      <text:p text:style-name="Text_20_body">Run:</text:p>
      <text:section text:style-name="Sect1" text:name="Section1">
        <text:p text:style-name="P1"><text:bookmark text:name="code-block-viewer"/><text:span text:style-name="Source_20_Text">curl -O https://dl.google.com/dl/cloudsdk/channels/rapid/downloads/google-cloud-cli-linux-x86_64.tar.gz</text:span></text:p>
      </text:section>
      <text:p text:style-name="Horizontal_20_Line"/>
      <text:h text:style-name="Heading_20_1" text:outline-level="1">Step 3: Extract the File</text:h>
      <text:section text:style-name="Sect1" text:name="Section2">
        <text:p text:style-name="P1"><text:bookmark text:name="code-block-viewer1"/><text:span text:style-name="Source_20_Text">tar -xf google-cloud-cli-linux-x86_64.tar.gz</text:span></text:p>
      </text:section>
      <text:p text:style-name="Horizontal_20_Line"/>
      <text:h text:style-name="Heading_20_1" text:outline-level="1">Step 4: Go to SDK Folder</text:h>
      <text:section text:style-name="Sect1" text:name="Section3">
        <text:p text:style-name="P1"><text:bookmark text:name="code-block-viewer2"/><text:span text:style-name="Source_20_Text">cd google-cloud-sdk</text:span></text:p>
      </text:section>
      <text:p text:style-name="Horizontal_20_Line"/>
      <text:h text:style-name="Heading_20_1" text:outline-level="1">Step 5: Run Installer</text:h>
      <text:section text:style-name="Sect1" text:name="Section4">
        <text:p text:style-name="P1"><text:bookmark text:name="code-block-viewer3"/><text:span text:style-name="Source_20_Text">./install.sh</text:span></text:p>
      </text:section>
      <text:p text:style-name="Text_20_body">When it asks:</text:p>
      <text:section text:style-name="Sect1" text:name="Section5">
        <text:p text:style-name="P1"><text:bookmark text:name="code-block-viewer4"/><text:span text:style-name="Source_20_Text">Do you want to help improve the Google Cloud CLI (y/N)?</text:span></text:p>
      </text:section>
      <text:p text:style-name="Text_20_body">Type:</text:p>
      <text:section text:style-name="Sect1" text:name="Section6">
        <text:p text:style-name="P1"><text:bookmark text:name="code-block-viewer5"/><text:span text:style-name="Source_20_Text">y</text:span></text:p>
      </text:section>
      <text:p text:style-name="Horizontal_20_Line"><text:soft-page-break/></text:p>
      <text:h text:style-name="Heading_20_1" text:outline-level="1">Step 6: Enable PATH</text:h>
      <text:p text:style-name="Text_20_body">When it asks:</text:p>
      <text:section text:style-name="Sect1" text:name="Section7">
        <text:p text:style-name="P1"><text:bookmark text:name="code-block-viewer6"/><text:span text:style-name="Source_20_Text">Modify profile to update your $PATH and enable shell command completion?</text:span></text:p>
      </text:section>
      <text:p text:style-name="Text_20_body">Type:</text:p>
      <text:section text:style-name="Sect1" text:name="Section8">
        <text:p text:style-name="P1"><text:bookmark text:name="code-block-viewer7"/><text:span text:style-name="Source_20_Text">Y</text:span></text:p>
      </text:section>
      <text:p text:style-name="Text_20_body">Then press:</text:p>
      <text:section text:style-name="Sect1" text:name="Section9">
        <text:p text:style-name="P1"><text:bookmark text:name="code-block-viewer8"/><text:span text:style-name="Source_20_Text">Enter</text:span></text:p>
      </text:section>
      <text:p text:style-name="Text_20_body">for default <text:span text:style-name="Source_20_Text">.bashrc</text:span></text:p>
      <text:p text:style-name="Horizontal_20_Line"/>
      <text:h text:style-name="Heading_20_1" text:outline-level="1">Step 7: Start New Shell</text:h>
      <text:p text:style-name="Text_20_body">Run:</text:p>
      <text:section text:style-name="Sect1" text:name="Section10">
        <text:p text:style-name="P1"><text:bookmark text:name="code-block-viewer9"/><text:span text:style-name="Source_20_Text">exec -l $SHELL</text:span></text:p>
      </text:section>
      <text:p text:style-name="Horizontal_20_Line"/>
      <text:h text:style-name="Heading_20_1" text:outline-level="1">Step 8: If <text:span text:style-name="Source_20_Text">gcloud</text:span> Command Not Found</text:h>
      <text:p text:style-name="Text_20_body">Run these two commands exactly like your screenshot:</text:p>
      <text:section text:style-name="Sect1" text:name="Section11">
        <text:p text:style-name="P1"><text:bookmark text:name="code-block-viewer10"/><text:span text:style-name="Source_20_Text">source ~/google-cloud-sdk/path.bash.inc</text:span></text:p>
      </text:section>
      <text:section text:style-name="Sect1" text:name="Section12">
        <text:p text:style-name="P1"><text:bookmark text:name="code-block-viewer11"/><text:span text:style-name="Source_20_Text">source ~/google-cloud-sdk/completion.bash.inc</text:span></text:p>
      </text:section>
      <text:p text:style-name="Horizontal_20_Line"/>
      <text:h text:style-name="Heading_20_1" text:outline-level="1">Step 9: Check Installation</text:h>
      <text:section text:style-name="Sect1" text:name="Section13">
        <text:p text:style-name="P1"><text:bookmark text:name="code-block-viewer12"/><text:span text:style-name="Source_20_Text">gcloud version</text:span></text:p>
      </text:section>
      <text:p text:style-name="Text_20_body">You should see output like:</text:p>
      <text:section text:style-name="Sect1" text:name="Section14">
        <text:p text:style-name="Preformatted_20_Text"><text:bookmark text:name="code-block-viewer13"/><text:span text:style-name="Source_20_Text">Google Cloud SDK 565.0.0</text:span></text:p>
        <text:p text:style-name="Preformatted_20_Text"><text:span text:style-name="Source_20_Text">bq 2.1.31</text:span></text:p>
        <text:p text:style-name="P1"><text:span text:style-name="Source_20_Text">gsutil 5.36</text:span></text:p>
      </text:section>
      <text:p text:style-name="Horizontal_20_Line"/>
      <text:h text:style-name="Heading_20_1" text:outline-level="1"><text:soft-page-break/>Step 10: Install App Engine Component</text:h>
      <text:p text:style-name="Text_20_body">Run:</text:p>
      <text:section text:style-name="Sect1" text:name="Section15">
        <text:p text:style-name="P1"><text:bookmark text:name="code-block-viewer14"/><text:span text:style-name="Source_20_Text">gcloud components install app-engine-python</text:span></text:p>
      </text:section>
      <text:p text:style-name="Text_20_body">For Java:</text:p>
      <text:section text:style-name="Sect1" text:name="Section16">
        <text:p text:style-name="P1"><text:bookmark text:name="code-block-viewer15"/><text:span text:style-name="Source_20_Text">gcloud components install app-engine-java</text:span></text:p>
      </text:section>
      <text:p text:style-name="Text_20_body">For Go:</text:p>
      <text:section text:style-name="Sect1" text:name="Section17">
        <text:p text:style-name="P1"><text:bookmark text:name="code-block-viewer16"/><text:span text:style-name="Source_20_Text">gcloud components install app-engine-go</text:span></text:p>
      </text:section>
      <text:p text:style-name="Horizontal_20_Line"/>
      <text:h text:style-name="Heading_20_1" text:outline-level="1">Step 11: Verify App Engine Installation</text:h>
      <text:p text:style-name="Text_20_body">Run:</text:p>
      <text:section text:style-name="Sect1" text:name="Section18">
        <text:p text:style-name="P1"><text:bookmark text:name="code-block-viewer17"/><text:span text:style-name="Source_20_Text">gcloud components list</text:span></text:p>
      </text:section>
      <text:p text:style-name="Text_20_body">You should see:</text:p>
      <text:section text:style-name="Sect1" text:name="Section19">
        <text:p text:style-name="Preformatted_20_Text"><text:bookmark text:name="code-block-viewer18"/><text:span text:style-name="Source_20_Text">app-engine-python</text:span></text:p>
        <text:p text:style-name="P1"><text:span text:style-name="Source_20_Text">Installed</text:span></text:p>
      </text:section>
      <text:p text:style-name="Horizontal_20_Line"/>
      <text:h text:style-name="Heading_20_1" text:outline-level="1">Step 12: Configure Without Sign-In</text:h>
      <text:p text:style-name="Text_20_body">You can use local SDK commands without login.</text:p>
      <text:p text:style-name="Text_20_body">Check configuration:</text:p>
      <text:section text:style-name="Sect1" text:name="Section20">
        <text:p text:style-name="P1"><text:bookmark text:name="code-block-viewer19"/><text:span text:style-name="Source_20_Text">gcloud config list</text:span></text:p>
      </text:section>
      <text:p text:style-name="Text_20_body">Set dummy project name locally:</text:p>
      <text:section text:style-name="Sect1" text:name="Section21">
        <text:p text:style-name="P1"><text:bookmark text:name="code-block-viewer20"/><text:span text:style-name="Source_20_Text">gcloud config set project my-local-project</text:span></text:p>
      </text:section>
      <text:p text:style-name="Text_20_body">No payment details required for local configuration.</text:p>
      <text:p text:style-name="Horizontal_20_Line"/>
      <text:h text:style-name="Heading_20_1" text:outline-level="1">Step 13: Create Simple App Engine Python App</text:h>
      <text:p text:style-name="Text_20_body">Create folder:</text:p>
      <text:section text:style-name="Sect1" text:name="Section22">
        <text:p text:style-name="P1"><text:bookmark text:name="code-block-viewer21"/><text:span text:style-name="Source_20_Text">mkdir myapp</text:span></text:p>
      </text:section>
      <text:section text:style-name="Sect1" text:name="Section23">
        <text:p text:style-name="P1"><text:bookmark text:name="code-block-viewer22"/><text:span text:style-name="Source_20_Text">cd myapp</text:span></text:p>
      </text:section>
      <text:p text:style-name="Text_20_body"><text:soft-page-break/>Create <text:span text:style-name="Source_20_Text">app.yaml</text:span></text:p>
      <text:section text:style-name="Sect1" text:name="Section24">
        <text:p text:style-name="P1"><text:bookmark text:name="code-block-viewer23"/><text:span text:style-name="Source_20_Text">nano app.yaml</text:span></text:p>
      </text:section>
      <text:p text:style-name="Text_20_body">Paste:</text:p>
      <text:section text:style-name="Sect1" text:name="Section25">
        <text:p text:style-name="Preformatted_20_Text"><text:bookmark text:name="code-block-viewer24"/><text:span text:style-name="Source_20_Text">runtime: python39</text:span></text:p>
        <text:p text:style-name="P1"><text:span text:style-name="Source_20_Text">entrypoint: python main.py</text:span></text:p>
      </text:section>
      <text:p text:style-name="Text_20_body">Save:</text:p>
      <text:list xml:id="list3763003785" text:style-name="L1">
        <text:list-item>
          <text:p text:style-name="P4">CTRL + X </text:p>
        </text:list-item>
        <text:list-item>
          <text:p text:style-name="P4">Y </text:p>
        </text:list-item>
        <text:list-item>
          <text:p text:style-name="P2">Enter </text:p>
        </text:list-item>
      </text:list>
      <text:p text:style-name="Horizontal_20_Line"/>
      <text:h text:style-name="Heading_20_1" text:outline-level="1">Step 14: Create Python File</text:h>
      <text:section text:style-name="Sect1" text:name="Section26">
        <text:p text:style-name="P1"><text:bookmark text:name="code-block-viewer25"/><text:span text:style-name="Source_20_Text">nano main.py</text:span></text:p>
      </text:section>
      <text:p text:style-name="Text_20_body">Paste:</text:p>
      <text:section text:style-name="Sect1" text:name="Section27">
        <text:p text:style-name="Preformatted_20_Text"><text:bookmark text:name="code-block-viewer26"/><text:span text:style-name="Source_20_Text">from http.server import BaseHTTPRequestHandler, HTTPServer</text:span></text:p>
        <text:p text:style-name="Preformatted_20_Text"><text:span text:style-name="Source_20_Text">class handler(BaseHTTPRequestHandler):</text:span></text:p>
        <text:p text:style-name="Preformatted_20_Text"><text:span text:style-name="Source_20_Text"><text:s text:c="4"/>def do_GET(self):</text:span></text:p>
        <text:p text:style-name="Preformatted_20_Text"><text:span text:style-name="Source_20_Text"><text:s text:c="8"/>self.send_response(200)</text:span></text:p>
        <text:p text:style-name="Preformatted_20_Text"><text:span text:style-name="Source_20_Text"><text:s text:c="8"/>self.end_headers()</text:span></text:p>
        <text:p text:style-name="Preformatted_20_Text"><text:span text:style-name="Source_20_Text"><text:s text:c="8"/>self.wfile.write(b"Google App Engine Working")</text:span></text:p>
        <text:p text:style-name="Preformatted_20_Text"><text:span text:style-name="Source_20_Text">server = HTTPServer(("localhost", 8080), handler)</text:span></text:p>
        <text:p text:style-name="P1"><text:span text:style-name="Source_20_Text">server.serve_forever()</text:span></text:p>
      </text:section>
      <text:p text:style-name="Text_20_body">Save:</text:p>
      <text:list xml:id="list725848255" text:style-name="L2">
        <text:list-item>
          <text:p text:style-name="P5">CTRL + X </text:p>
        </text:list-item>
        <text:list-item>
          <text:p text:style-name="P5">Y </text:p>
        </text:list-item>
        <text:list-item>
          <text:p text:style-name="P3">Enter </text:p>
        </text:list-item>
      </text:list>
      <text:p text:style-name="Horizontal_20_Line"/>
      <text:h text:style-name="Heading_20_1" text:outline-level="1">Step 15: Run Locally</text:h>
      <text:section text:style-name="Sect1" text:name="Section28">
        <text:p text:style-name="P1"><text:bookmark text:name="code-block-viewer27"/><text:span text:style-name="Source_20_Text">python3 main.py</text:span></text:p>
      </text:section>
      <text:p text:style-name="Text_20_body">Open browser:</text:p>
      <text:section text:style-name="Sect1" text:name="Section29">
        <text:p text:style-name="P1"><text:bookmark text:name="code-block-viewer28"/><text:span text:style-name="Source_20_Text">http://localhost:8080</text:span></text:p>
      </text:section>
      <text:p text:style-name="Text_20_body">You will see:</text:p>
      <text:section text:style-name="Sect1" text:name="Section30">
        <text:p text:style-name="P1"><text:bookmark text:name="code-block-viewer29"/><text:span text:style-name="Source_20_Text">Google App Engine Working</text:span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12T12:15:20.929618191</meta:creation-date>
    <dc:date>2026-05-12T12:15:40.161075041</dc:date>
    <meta:editing-duration>PT19S</meta:editing-duration>
    <meta:editing-cycles>1</meta:editing-cycles>
    <meta:document-statistic meta:table-count="0" meta:image-count="0" meta:object-count="0" meta:page-count="4" meta:paragraph-count="93" meta:word-count="321" meta:character-count="2259" meta:non-whitespace-character-count="2003"/>
    <meta:generator>LibreOffice/6.4.7.2$Linux_X86_64 LibreOffice_project/40$Build-2</meta:generator>
  </office:meta>
</office:document-meta>
</file>